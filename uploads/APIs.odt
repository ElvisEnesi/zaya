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lright bro, let me teach you APIs in a <text:span text:style-name="Strong_20_Emphasis">simple, clear, beginner-friendly way</text:span> — something you can use immediately in web development, backend, PHP, JavaScript, Python, anything.<text:line-break/>I'll break it down step-by-step so you understand everything from scratch.</text:p>
      <text:p text:style-name="Horizontal_20_Line"/>
      <text:h text:style-name="Heading_20_1" text:outline-level="1">🚀 <text:span text:style-name="Strong_20_Emphasis">1. What is an API? (Simple Explanation)</text:span></text:h>
      <text:p text:style-name="Text_20_body"><text:span text:style-name="Strong_20_Emphasis">API = Application Programming Interface.</text:span></text:p>
      <text:p text:style-name="Text_20_body">It is <text:span text:style-name="Strong_20_Emphasis">a bridge that allows two systems to talk to each other.</text:span></text:p>
      <text:p text:style-name="Text_20_body">Example:</text:p>
      <text:list xml:id="list918201285" text:style-name="L1">
        <text:list-item>
          <text:p text:style-name="P2">Your website wants weather data → You call <text:span text:style-name="Strong_20_Emphasis">Weather API</text:span>.</text:p>
        </text:list-item>
        <text:list-item>
          <text:p text:style-name="P2">Your app wants user location → It calls <text:span text:style-name="Strong_20_Emphasis">Google Maps API</text:span>.</text:p>
        </text:list-item>
        <text:list-item>
          <text:p text:style-name="P2">Your website wants payment processing → It uses <text:span text:style-name="Strong_20_Emphasis">Paystack API</text:span>.</text:p>
        </text:list-item>
      </text:list>
      <text:p text:style-name="Text_20_body">So API = <text:span text:style-name="Strong_20_Emphasis">your code asking another system for data</text:span> and receiving a response.</text:p>
      <text:p text:style-name="Horizontal_20_Line"/>
      <text:h text:style-name="Heading_20_1" text:outline-level="1">🔌 <text:span text:style-name="Strong_20_Emphasis">2. How APIs Work (Simple Flow)</text:span></text:h>
      <text:p text:style-name="Text_20_body">Every API works almost like this:</text:p>
      <text:h text:style-name="Heading_20_3" text:outline-level="3">✔️ You send a request</text:h>
      <text:p text:style-name="Text_20_body">Usually using URL like:</text:p>
      <text:p text:style-name="P1"><text:span text:style-name="Source_20_Text">https://api.example.com/users?limit=10</text:span></text:p>
      <text:h text:style-name="Heading_20_3" text:outline-level="3">✔️ You include method</text:h>
      <text:list xml:id="list2978243911" text:style-name="L2">
        <text:list-item>
          <text:p text:style-name="P3"><text:span text:style-name="Strong_20_Emphasis">GET</text:span> – fetch data</text:p>
        </text:list-item>
        <text:list-item>
          <text:p text:style-name="P3"><text:span text:style-name="Strong_20_Emphasis">POST</text:span> – send data</text:p>
        </text:list-item>
        <text:list-item>
          <text:p text:style-name="P3"><text:span text:style-name="Strong_20_Emphasis">PUT</text:span> – update</text:p>
        </text:list-item>
        <text:list-item>
          <text:p text:style-name="P3"><text:span text:style-name="Strong_20_Emphasis">DELETE</text:span> – delete</text:p>
        </text:list-item>
      </text:list>
      <text:h text:style-name="Heading_20_3" text:outline-level="3">✔️ You may include headers</text:h>
      <text:p text:style-name="Text_20_body">Example (Authorization key):</text:p>
      <text:p text:style-name="Preformatted_20_Text"><text:span text:style-name="Source_20_Text">Authorization: Bearer 12345abcd</text:span></text:p>
      <text:p text:style-name="P1"><text:span text:style-name="Source_20_Text">Content-Type: application/json</text:span></text:p>
      <text:h text:style-name="Heading_20_3" text:outline-level="3"><text:soft-page-break/>✔️ API responds with JSON</text:h>
      <text:p text:style-name="Text_20_body">Example response:</text:p>
      <text:p text:style-name="Preformatted_20_Text"><text:span text:style-name="Source_20_Text">{</text:span></text:p>
      <text:p text:style-name="Preformatted_20_Text"><text:span text:style-name="Source_20_Text"><text:s text:c="2"/>"status": "success",</text:span></text:p>
      <text:p text:style-name="Preformatted_20_Text"><text:span text:style-name="Source_20_Text"><text:s text:c="2"/>"users": [</text:span></text:p>
      <text:p text:style-name="Preformatted_20_Text"><text:span text:style-name="Source_20_Text"><text:s text:c="4"/>{"id": 1, "name": "Elvis"},</text:span></text:p>
      <text:p text:style-name="Preformatted_20_Text"><text:span text:style-name="Source_20_Text"><text:s text:c="4"/>{"id": 2, "name": "Nasri"}</text:span></text:p>
      <text:p text:style-name="Preformatted_20_Text"><text:span text:style-name="Source_20_Text"><text:s text:c="2"/>]</text:span></text:p>
      <text:p text:style-name="P1"><text:span text:style-name="Source_20_Text">}</text:span></text:p>
      <text:p text:style-name="Horizontal_20_Line"/>
      <text:h text:style-name="Heading_20_1" text:outline-level="1">📦 <text:span text:style-name="Strong_20_Emphasis">3. Types of APIs</text:span></text:h>
      <text:h text:style-name="Heading_20_3" text:outline-level="3">🔹 <text:span text:style-name="Strong_20_Emphasis">REST API</text:span> (most common)</text:h>
      <text:p text:style-name="Text_20_body">Uses URLs, JSON, HTTP methods.</text:p>
      <text:h text:style-name="Heading_20_3" text:outline-level="3">🔹 <text:span text:style-name="Strong_20_Emphasis">GraphQL</text:span></text:h>
      <text:p text:style-name="Text_20_body">You request only the exact data you need.</text:p>
      <text:h text:style-name="Heading_20_3" text:outline-level="3">🔹 <text:span text:style-name="Strong_20_Emphasis">SOAP API</text:span></text:h>
      <text:p text:style-name="Text_20_body">Old-style, uses XML.</text:p>
      <text:h text:style-name="Heading_20_3" text:outline-level="3">🔹 <text:span text:style-name="Strong_20_Emphasis">Webhooks</text:span></text:h>
      <text:p text:style-name="Text_20_body">Instead of you calling the API, the API calls <text:span text:style-name="Strong_20_Emphasis">you</text:span> (Paystack verification, GitHub notifications, etc.)</text:p>
      <text:p text:style-name="Horizontal_20_Line"/>
      <text:h text:style-name="Heading_20_1" text:outline-level="1">🔑 <text:span text:style-name="Strong_20_Emphasis">4. Important API Concepts</text:span></text:h>
      <text:h text:style-name="Heading_20_3" text:outline-level="3"><text:span text:style-name="Strong_20_Emphasis">1. Endpoint</text:span></text:h>
      <text:p text:style-name="Text_20_body">A specific URL to access data.</text:p>
      <text:p text:style-name="Text_20_body">Example:<text:line-break/><text:span text:style-name="Source_20_Text">/users</text:span><text:line-break/><text:span text:style-name="Source_20_Text">/posts/45</text:span><text:line-break/><text:span text:style-name="Source_20_Text">/weather/today</text:span></text:p>
      <text:h text:style-name="Heading_20_3" text:outline-level="3"><text:span text:style-name="Strong_20_Emphasis">2. API Key / Token</text:span></text:h>
      <text:p text:style-name="Text_20_body">A secret key to prove you are the developer.</text:p>
      <text:h text:style-name="Heading_20_3" text:outline-level="3"><text:soft-page-break/><text:span text:style-name="Strong_20_Emphasis">3. Rate Limits</text:span></text:h>
      <text:p text:style-name="Text_20_body">Limits on how many calls you can make per minute.</text:p>
      <text:h text:style-name="Heading_20_3" text:outline-level="3"><text:span text:style-name="Strong_20_Emphasis">4. JSON</text:span></text:h>
      <text:p text:style-name="Text_20_body">Most APIs use JSON format.</text:p>
      <text:p text:style-name="Horizontal_20_Line"/>
      <text:h text:style-name="Heading_20_1" text:outline-level="1">🧑‍💻 <text:span text:style-name="Strong_20_Emphasis">5. How to Use APIs in Code</text:span></text:h>
      <text:p text:style-name="Text_20_body">Let me show examples in <text:span text:style-name="Strong_20_Emphasis">JavaScript</text:span>, <text:span text:style-name="Strong_20_Emphasis">PHP (mysqli)</text:span>, and <text:span text:style-name="Strong_20_Emphasis">Python</text:span> so you will understand very well.</text:p>
      <text:p text:style-name="Horizontal_20_Line"/>
      <text:h text:style-name="Heading_20_1" text:outline-level="1">🟦 <text:span text:style-name="Strong_20_Emphasis">A. JavaScript (Frontend or Node.js)</text:span></text:h>
      <text:h text:style-name="Heading_20_3" text:outline-level="3">👉 GET Request Example</text:h>
      <text:p text:style-name="Preformatted_20_Text"><text:span text:style-name="Source_20_Text">fetch("https://api.example.com/users")</text:span></text:p>
      <text:p text:style-name="Preformatted_20_Text"><text:span text:style-name="Source_20_Text"><text:s text:c="2"/>.then(res =&gt; res.json())</text:span></text:p>
      <text:p text:style-name="Preformatted_20_Text"><text:span text:style-name="Source_20_Text"><text:s text:c="2"/>.then(data =&gt; console.log(data))</text:span></text:p>
      <text:p text:style-name="P1"><text:span text:style-name="Source_20_Text"><text:s text:c="2"/>.catch(err =&gt; console.error(err));</text:span></text:p>
      <text:h text:style-name="Heading_20_3" text:outline-level="3">👉 GET with API KEY</text:h>
      <text:p text:style-name="Preformatted_20_Text"><text:span text:style-name="Source_20_Text">fetch("https://api.example.com/weather", {</text:span></text:p>
      <text:p text:style-name="Preformatted_20_Text"><text:span text:style-name="Source_20_Text"><text:s text:c="2"/>headers: {</text:span></text:p>
      <text:p text:style-name="Preformatted_20_Text"><text:span text:style-name="Source_20_Text"><text:s text:c="4"/>"Authorization": "Bearer YOUR_API_KEY"</text:span></text:p>
      <text:p text:style-name="Preformatted_20_Text"><text:span text:style-name="Source_20_Text"><text:s text:c="2"/>}</text:span></text:p>
      <text:p text:style-name="Preformatted_20_Text"><text:span text:style-name="Source_20_Text">})</text:span></text:p>
      <text:p text:style-name="Preformatted_20_Text"><text:span text:style-name="Source_20_Text">.then(res =&gt; res.json())</text:span></text:p>
      <text:p text:style-name="P1"><text:span text:style-name="Source_20_Text">.then(data =&gt; console.log(data));</text:span></text:p>
      <text:p text:style-name="Horizontal_20_Line"/>
      <text:h text:style-name="Heading_20_1" text:outline-level="1">🟩 <text:span text:style-name="Strong_20_Emphasis">B. PHP Example (using cURL, works with mysqli too)</text:span></text:h>
      <text:h text:style-name="Heading_20_3" text:outline-level="3">👉 SIMPLE GET Request</text:h>
      <text:p text:style-name="Preformatted_20_Text"><text:span text:style-name="Source_20_Text">&lt;?php</text:span></text:p>
      <text:p text:style-name="Preformatted_20_Text"><text:span text:style-name="Source_20_Text">$url = "https://api.example.com/users";</text:span></text:p>
      <text:p text:style-name="Preformatted_20_Text"/>
      <text:p text:style-name="Preformatted_20_Text"><text:span text:style-name="Source_20_Text">$curl = curl_init($url);</text:span></text:p>
      <text:p text:style-name="Preformatted_20_Text"><text:span text:style-name="Source_20_Text">curl_setopt($curl, CURLOPT_RETURNTRANSFER, true);</text:span></text:p>
      <text:p text:style-name="Preformatted_20_Text"/>
      <text:p text:style-name="Preformatted_20_Text"><text:span text:style-name="Source_20_Text">$response = curl_exec($curl);</text:span></text:p>
      <text:p text:style-name="Preformatted_20_Text"><text:soft-page-break/><text:span text:style-name="Source_20_Text">curl_close($curl);</text:span></text:p>
      <text:p text:style-name="Preformatted_20_Text"/>
      <text:p text:style-name="Preformatted_20_Text"><text:span text:style-name="Source_20_Text">$data = json_decode($response, true);</text:span></text:p>
      <text:p text:style-name="Preformatted_20_Text"/>
      <text:p text:style-name="Preformatted_20_Text"><text:span text:style-name="Source_20_Text">print_r($data);</text:span></text:p>
      <text:p text:style-name="P1"><text:span text:style-name="Source_20_Text">?&gt;</text:span></text:p>
      <text:h text:style-name="Heading_20_3" text:outline-level="3">👉 GET with API KEY</text:h>
      <text:p text:style-name="Preformatted_20_Text"><text:span text:style-name="Source_20_Text">&lt;?php</text:span></text:p>
      <text:p text:style-name="Preformatted_20_Text"><text:span text:style-name="Source_20_Text">$url = "https://api.example.com/weather";</text:span></text:p>
      <text:p text:style-name="Preformatted_20_Text"/>
      <text:p text:style-name="Preformatted_20_Text"><text:span text:style-name="Source_20_Text">$headers = [</text:span></text:p>
      <text:p text:style-name="Preformatted_20_Text"><text:span text:style-name="Source_20_Text"><text:s text:c="4"/>"Authorization: Bearer YOUR_API_KEY",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$curl = curl_init($url);</text:span></text:p>
      <text:p text:style-name="Preformatted_20_Text"><text:span text:style-name="Source_20_Text">curl_setopt($curl, CURLOPT_HTTPHEADER, $headers);</text:span></text:p>
      <text:p text:style-name="Preformatted_20_Text"><text:span text:style-name="Source_20_Text">curl_setopt($curl, CURLOPT_RETURNTRANSFER, true);</text:span></text:p>
      <text:p text:style-name="Preformatted_20_Text"/>
      <text:p text:style-name="Preformatted_20_Text"><text:span text:style-name="Source_20_Text">$response = curl_exec($curl);</text:span></text:p>
      <text:p text:style-name="Preformatted_20_Text"><text:span text:style-name="Source_20_Text">curl_close($curl);</text:span></text:p>
      <text:p text:style-name="Preformatted_20_Text"/>
      <text:p text:style-name="Preformatted_20_Text"><text:span text:style-name="Source_20_Text">$data = json_decode($response, true);</text:span></text:p>
      <text:p text:style-name="Preformatted_20_Text"/>
      <text:p text:style-name="Preformatted_20_Text"><text:span text:style-name="Source_20_Text">print_r($data);</text:span></text:p>
      <text:p text:style-name="P1"><text:span text:style-name="Source_20_Text">?&gt;</text:span></text:p>
      <text:h text:style-name="Heading_20_3" text:outline-level="3">👉 POST Request (send data)</text:h>
      <text:p text:style-name="Preformatted_20_Text"><text:span text:style-name="Source_20_Text">&lt;?php</text:span></text:p>
      <text:p text:style-name="Preformatted_20_Text"><text:span text:style-name="Source_20_Text">$url = "https://api.example.com/create-user";</text:span></text:p>
      <text:p text:style-name="Preformatted_20_Text"/>
      <text:p text:style-name="Preformatted_20_Text"><text:span text:style-name="Source_20_Text">$data = [</text:span></text:p>
      <text:p text:style-name="Preformatted_20_Text"><text:span text:style-name="Source_20_Text"><text:s text:c="4"/>"name" =&gt; "Elvis",</text:span></text:p>
      <text:p text:style-name="Preformatted_20_Text"><text:span text:style-name="Source_20_Text"><text:s text:c="4"/>"email" =&gt; "elvis@example.com"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$curl = curl_init($url);</text:span></text:p>
      <text:p text:style-name="Preformatted_20_Text"><text:span text:style-name="Source_20_Text">curl_setopt($curl, CURLOPT_POST, true);</text:span></text:p>
      <text:p text:style-name="Preformatted_20_Text"><text:span text:style-name="Source_20_Text">curl_setopt($curl, CURLOPT_POSTFIELDS, json_encode($data));</text:span></text:p>
      <text:p text:style-name="Preformatted_20_Text"><text:span text:style-name="Source_20_Text">curl_setopt($curl, CURLOPT_HTTPHEADER, [</text:span></text:p>
      <text:p text:style-name="Preformatted_20_Text"><text:span text:style-name="Source_20_Text"><text:s text:c="4"/>"Content-Type: application/json"</text:span></text:p>
      <text:p text:style-name="Preformatted_20_Text"><text:span text:style-name="Source_20_Text">]);</text:span></text:p>
      <text:p text:style-name="Preformatted_20_Text"><text:span text:style-name="Source_20_Text">curl_setopt($curl, CURLOPT_RETURNTRANSFER, true);</text:span></text:p>
      <text:p text:style-name="Preformatted_20_Text"/>
      <text:p text:style-name="Preformatted_20_Text"><text:span text:style-name="Source_20_Text">$response = curl_exec($curl);</text:span></text:p>
      <text:p text:style-name="Preformatted_20_Text"><text:span text:style-name="Source_20_Text">curl_close($curl);</text:span></text:p>
      <text:p text:style-name="Preformatted_20_Text"/>
      <text:p text:style-name="Preformatted_20_Text"><text:span text:style-name="Source_20_Text">echo $response;</text:span></text:p>
      <text:p text:style-name="P1"><text:span text:style-name="Source_20_Text">?&gt;</text:span></text:p>
      <text:p text:style-name="Horizontal_20_Line"/>
      <text:h text:style-name="Heading_20_1" text:outline-level="1"><text:soft-page-break/>🐍 <text:span text:style-name="Strong_20_Emphasis">C. Python Example</text:span></text:h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url = "https://api.example.com/users"</text:span></text:p>
      <text:p text:style-name="Preformatted_20_Text"><text:span text:style-name="Source_20_Text">r = requests.get(url)</text:span></text:p>
      <text:p text:style-name="Preformatted_20_Text"/>
      <text:p text:style-name="P1"><text:span text:style-name="Source_20_Text">print(r.json())</text:span></text:p>
      <text:p text:style-name="Horizontal_20_Line"/>
      <text:h text:style-name="Heading_20_1" text:outline-level="1">🧠 <text:span text:style-name="Strong_20_Emphasis">6. Skills You Must Know for APIs</text:span></text:h>
      <text:p text:style-name="Text_20_body">To be comfortable using APIs, you must understand:</text:p>
      <text:p text:style-name="Text_20_body">✔ HTTP methods (GET, POST, PUT, DELETE)<text:line-break/>✔ Headers (especially Authentication)<text:line-break/>✔ JSON<text:line-break/>✔ Requests &amp; Responses<text:line-break/>✔ Error handling<text:line-break/>✔ API documentation (the manual)</text:p>
      <text:p text:style-name="Horizontal_20_Line"/>
      <text:h text:style-name="Heading_20_1" text:outline-level="1">📚 <text:span text:style-name="Strong_20_Emphasis">7. How to Read API Documentation (Very Important)</text:span></text:h>
      <text:p text:style-name="Text_20_body">API documentation will tell you:</text:p>
      <text:list xml:id="list3939602798" text:style-name="L3">
        <text:list-item>
          <text:p text:style-name="P4">The endpoints (<text:span text:style-name="Source_20_Text">/users</text:span>, <text:span text:style-name="Source_20_Text">/login</text:span>, <text:span text:style-name="Source_20_Text">/payments</text:span>)</text:p>
        </text:list-item>
        <text:list-item>
          <text:p text:style-name="P4">Required parameters</text:p>
        </text:list-item>
        <text:list-item>
          <text:p text:style-name="P4">Examples of requests &amp; responses</text:p>
        </text:list-item>
        <text:list-item>
          <text:p text:style-name="P4">Authentication method</text:p>
        </text:list-item>
        <text:list-item>
          <text:p text:style-name="P4">Rate limits</text:p>
        </text:list-item>
        <text:list-item>
          <text:p text:style-name="P4">Error codes</text:p>
        </text:list-item>
      </text:list>
      <text:p text:style-name="Text_20_body">If you can read API docs, you can work with ANY API.</text:p>
      <text:p text:style-name="Horizontal_20_Line"/>
      <text:h text:style-name="Heading_20_1" text:outline-level="1">🛠 <text:span text:style-name="Strong_20_Emphasis">8. Practice APIs You Can Try Today</text:span></text:h>
      <text:p text:style-name="Text_20_body">Try these free APIs:</text:p>
      <text:h text:style-name="Heading_20_3" text:outline-level="3"><text:soft-page-break/>✔ JSONPlaceholder (fake posts &amp; users)</text:h>
      <text:p text:style-name="Text_20_body"><text:a xlink:type="simple" xlink:href="https://jsonplaceholder.typicode.com/" text:style-name="Internet_20_link" text:visited-style-name="Visited_20_Internet_20_Link">https://jsonplaceholder.typicode.com</text:a></text:p>
      <text:h text:style-name="Heading_20_3" text:outline-level="3">✔ Dummy JSON API</text:h>
      <text:p text:style-name="Text_20_body"><text:a xlink:type="simple" xlink:href="https://dummyjson.com/" text:style-name="Internet_20_link" text:visited-style-name="Visited_20_Internet_20_Link">https://dummyjson.com</text:a></text:p>
      <text:h text:style-name="Heading_20_3" text:outline-level="3">✔ OpenWeather API</text:h>
      <text:p text:style-name="Text_20_body"><text:a xlink:type="simple" xlink:href="https://openweathermap.org/api" text:style-name="Internet_20_link" text:visited-style-name="Visited_20_Internet_20_Link">https://openweathermap.org/api</text:a></text:p>
      <text:h text:style-name="Heading_20_3" text:outline-level="3">✔ Paystack API</text:h>
      <text:p text:style-name="Text_20_body">(for payments in Nigeria)</text:p>
      <text:p text:style-name="Horizontal_20_Line"/>
      <text:h text:style-name="Heading_20_1" text:outline-level="1">🏆 <text:span text:style-name="Strong_20_Emphasis">9. If you want, I can also teach you:</text:span></text:h>
      <text:p text:style-name="Text_20_body">🔥 How to build your <text:span text:style-name="Strong_20_Emphasis">own API</text:span> using PHP or Node.js<text:line-break/>🔥 How to connect your API to a database<text:line-break/>🔥 How to secure your API<text:line-break/>🔥 How to test APIs with Postman<text:line-break/>🔥 How to use JWT authentication</text:p>
      <text:p text:style-name="Text_20_body">Just tell me “teach me how to build APIs” and I’ll take you step-by-step.</text:p>
      <text:p text:style-name="Horizontal_20_Line"/>
      <text:p text:style-name="Text_20_body">If you want, I can also give you:</text:p>
      <text:p text:style-name="Text_20_body">✅ A full beginner API course<text:line-break/>✅ Practice exercises<text:line-break/>✅ Real projects like building a weather app, currency converter, login system, etc.</text:p>
      <text:p text:style-name="Text_20_body">Just tell me where you want to start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9T01:55:14.093153492</meta:creation-date>
    <dc:date>2025-11-29T01:56:39.893901260</dc:date>
    <meta:editing-duration>PT1M49S</meta:editing-duration>
    <meta:editing-cycles>1</meta:editing-cycles>
    <meta:document-statistic meta:table-count="0" meta:image-count="0" meta:object-count="0" meta:page-count="6" meta:paragraph-count="143" meta:word-count="704" meta:character-count="4614" meta:non-whitespace-character-count="4017"/>
    <meta:generator>LibreOffice/6.4.7.2$Linux_X86_64 LibreOffice_project/40$Build-2</meta:generator>
  </office:meta>
</office:document-meta>
</file>